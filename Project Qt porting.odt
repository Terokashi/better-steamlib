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2.669cm"/>
    </style:style>
    <style:style style:name="Tabelle1.B" style:family="table-column">
      <style:table-column-properties style:column-width="7.93cm"/>
    </style:style>
    <style:style style:name="Tabelle1.C" style:family="table-column">
      <style:table-column-properties style:column-width="6.399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3">
      <style:paragraph-properties fo:margin-top="0cm" fo:margin-bottom="0cm"/>
    </style:style>
    <style:style style:name="P13" style:family="paragraph" style:parent-style-name="Text_20_body" style:list-style-name="L4">
      <style:paragraph-properties fo:margin-top="0cm" fo:margin-bottom="0cm"/>
    </style:style>
    <style:style style:name="P14" style:family="paragraph" style:parent-style-name="Text_20_body" style:list-style-name="L5">
      <style:paragraph-properties fo:margin-top="0cm" fo:margin-bottom="0cm"/>
    </style:style>
    <style:style style:name="P15" style:family="paragraph" style:parent-style-name="Text_20_body" style:list-style-name="L6">
      <style:paragraph-properties fo:margin-top="0cm" fo:margin-bottom="0cm"/>
    </style:style>
    <style:style style:name="P16" style:family="paragraph" style:parent-style-name="Text_20_body" style:list-style-name="L7">
      <style:paragraph-properties fo:margin-top="0cm" fo:margin-bottom="0cm"/>
    </style:style>
    <style:style style:name="P17" style:family="paragraph" style:parent-style-name="Text_20_body" style:list-style-name="L8">
      <style:paragraph-properties fo:margin-top="0cm" fo:margin-bottom="0cm"/>
    </style:style>
    <style:style style:name="P18" style:family="paragraph" style:parent-style-name="Text_20_body" style:list-style-name="L9">
      <style:paragraph-properties fo:margin-top="0cm" fo:margin-bottom="0cm"/>
    </style:style>
    <style:style style:name="P19" style:family="paragraph" style:parent-style-name="Preformatted_20_Text" style:list-style-name="L1"/>
    <style:style style:name="P20" style:family="paragraph" style:parent-style-name="Preformatted_20_Text" style:list-style-name="L2"/>
    <style:style style:name="P21" style:family="paragraph" style:parent-style-name="Preformatted_20_Text" style:list-style-name="L3"/>
    <style:style style:name="P22" style:family="paragraph" style:parent-style-name="Preformatted_20_Text" style:list-style-name="L4"/>
    <style:style style:name="P23" style:family="paragraph" style:parent-style-name="Preformatted_20_Text" style:list-style-name="L6"/>
    <style:style style:name="P24" style:family="paragraph" style:parent-style-name="Preformatted_20_Text" style:list-style-name="L8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Phase 1 – Refactor for Multi-Launcher Support</text:span></text:h>
      <text:p text:style-name="Text_20_body"><text:span text:style-name="Strong_20_Emphasis">Goal:</text:span> Make your code modular so adding Epic/GOG/etc. later is easy.</text:p>
      <text:list xml:id="list3784437783938833558" text:style-name="L1">
        <text:list-item>
          <text:p text:style-name="P1"><text:span text:style-name="Strong_20_Emphasis">Create a common interface for all libraries</text:span></text:p>
        </text:list-item>
      </text:list>
      <text:section text:style-name="Sect1" text:name="code-block-viewer">
        <text:list xml:id="list36459326" text:continue-numbering="true" text:style-name="L1">
          <text:list-header>
            <text:p text:style-name="P19">class IGameLibrary {</text:p>
            <text:p text:style-name="P19">public:</text:p>
            <text:p text:style-name="P19"><text:s text:c="4"/>virtual ~IGameLibrary() = default;</text:p>
            <text:p text:style-name="P19"><text:s text:c="4"/>virtual std::vector&lt;Game&gt; loadGames() = 0;</text:p>
            <text:p text:style-name="P19"><text:s text:c="4"/>virtual void refresh() = 0;</text:p>
            <text:p text:style-name="P19"><text:s text:c="4"/>virtual std::string getName() const = 0; // for UI/filters</text:p>
            <text:p text:style-name="P19">};</text:p>
          </text:list-header>
        </text:list>
      </text:section>
      <text:list xml:id="list36455582" text:continue-numbering="true" text:style-name="L1">
        <text:list-item>
          <text:p text:style-name="P10"><text:span text:style-name="Strong_20_Emphasis">Refactor Steam logic into a class</text:span> </text:p>
          <text:list>
            <text:list-item>
              <text:p text:style-name="P10">Move all <text:span text:style-name="Source_20_Text">steam_parser</text:span> functions into <text:span text:style-name="Source_20_Text">SteamLibrary</text:span> implementing <text:span text:style-name="Source_20_Text">IGameLibrary</text:span>. </text:p>
            </text:list-item>
            <text:list-item>
              <text:p text:style-name="P10">Add <text:span text:style-name="Source_20_Text">refresh()</text:span> and <text:span text:style-name="Source_20_Text">loadGames()</text:span> methods. </text:p>
            </text:list-item>
            <text:list-item>
              <text:p text:style-name="P10">Keep the cache logic inside <text:span text:style-name="Source_20_Text">SteamLibrary</text:span> (or GameManager if shared). </text:p>
            </text:list-item>
          </text:list>
        </text:list-item>
        <text:list-item>
          <text:p text:style-name="P10"><text:span text:style-name="Strong_20_Emphasis">Add a </text:span><text:span text:style-name="Strong_20_Emphasis"><text:span text:style-name="Source_20_Text">GameManager</text:span></text:span> </text:p>
          <text:list>
            <text:list-item>
              <text:p text:style-name="P10">Holds multiple <text:span text:style-name="Source_20_Text">IGameLibrary</text:span> instances. </text:p>
            </text:list-item>
            <text:list-item>
              <text:p text:style-name="P10">Merges their games into a single list for sorting/filtering. </text:p>
            </text:list-item>
            <text:list-item>
              <text:p text:style-name="P1">Example:</text:p>
            </text:list-item>
          </text:list>
        </text:list-item>
      </text:list>
      <text:section text:style-name="Sect1" text:name="Bereich1">
        <text:list xml:id="list36464093" text:continue-numbering="true" text:style-name="L1">
          <text:list-item>
            <text:list>
              <text:list-header>
                <text:p text:style-name="P19"><text:bookmark text:name="code-block-viewer"/>class GameManager {</text:p>
                <text:p text:style-name="P19"><text:s text:c="4"/>std::vector&lt;std::unique_ptr&lt;IGameLibrary&gt;&gt; libraries;</text:p>
                <text:p text:style-name="P19">public:</text:p>
                <text:p text:style-name="P19"><text:s text:c="4"/>void addLibrary(std::unique_ptr&lt;IGameLibrary&gt; lib);</text:p>
                <text:p text:style-name="P19"><text:s text:c="4"/>std::vector&lt;Game&gt; getAllGames();</text:p>
                <text:p text:style-name="P19">};</text:p>
              </text:list-header>
            </text:list>
          </text:list-item>
        </text:list>
      </text:section>
      <text:list xml:id="list36482105" text:continue-numbering="true" text:style-name="L1">
        <text:list-item>
          <text:p text:style-name="P1"><text:span text:style-name="Strong_20_Emphasis">Update </text:span><text:span text:style-name="Strong_20_Emphasis"><text:span text:style-name="Source_20_Text">Game</text:span></text:span><text:span text:style-name="Strong_20_Emphasis"> struct</text:span></text:p>
          <text:list>
            <text:list-item>
              <text:p text:style-name="P10">Add <text:span text:style-name="Source_20_Text">launcher</text:span> field (enum: Steam, Epic, GOG…) </text:p>
            </text:list-item>
            <text:list-item>
              <text:p text:style-name="P1">Make <text:span text:style-name="Source_20_Text">id</text:span> a string (to avoid collisions across platforms). </text:p>
            </text:list-item>
          </text:list>
        </text:list-item>
      </text:list>
      <text:section text:style-name="Sect1" text:name="Bereich2">
        <text:list xml:id="list36469833" text:continue-numbering="true" text:style-name="L1">
          <text:list-header>
            <text:p text:style-name="P19"><text:bookmark text:name="code-block-viewer1"/>enum class Launcher { Steam, Epic, Gog };</text:p>
            <text:p text:style-name="P19">struct Game {</text:p>
            <text:p text:style-name="P19"><text:s text:c="4"/>Launcher launcher;</text:p>
            <text:p text:style-name="P19"><text:s text:c="4"/>std::string id;</text:p>
            <text:p text:style-name="P19"><text:s text:c="4"/>std::string name;</text:p>
            <text:p text:style-name="P19"><text:s text:c="4"/>std::string install_dir;</text:p>
            <text:p text:style-name="P19"><text:s text:c="4"/>std::string library_path;</text:p>
            <text:p text:style-name="P19"><text:s text:c="4"/>std::unordered_set&lt;std::string&gt; genres;</text:p>
            <text:p text:style-name="P19"><text:s text:c="4"/>std::unordered_set&lt;std::string&gt; tags;</text:p>
            <text:p text:style-name="P19">};</text:p>
          </text:list-header>
        </text:list>
      </text:section>
      <text:list xml:id="list36470372" text:continue-numbering="true" text:style-name="L1">
        <text:list-item>
          <text:p text:style-name="P10"><text:span text:style-name="Strong_20_Emphasis">Update your CLI logic</text:span> </text:p>
          <text:list>
            <text:list-item>
              <text:p text:style-name="P10">Use <text:span text:style-name="Source_20_Text">GameManager</text:span> to get all games. </text:p>
            </text:list-item>
            <text:list-item>
              <text:p text:style-name="P1">CLI stays mostly the same but now works with merged games from multiple launchers. </text:p>
            </text:list-item>
          </text:list>
        </text:list-item>
      </text:list>
      <text:h text:style-name="Heading_20_1" text:outline-level="1"><text:span text:style-name="Strong_20_Emphasis">Phase 2 – Prepare for Qt GUI</text:span></text:h>
      <text:p text:style-name="Text_20_body"><text:span text:style-name="Strong_20_Emphasis">Goal:</text:span> Make it easy to plug into Qt without rewriting logic.</text:p>
      <text:list xml:id="list5064593737553962654" text:style-name="L2">
        <text:list-item>
          <text:p text:style-name="P11"><text:span text:style-name="Strong_20_Emphasis">Expose </text:span><text:span text:style-name="Strong_20_Emphasis"><text:span text:style-name="Source_20_Text">GameManager</text:span></text:span><text:span text:style-name="Strong_20_Emphasis"> + </text:span><text:span text:style-name="Strong_20_Emphasis"><text:span text:style-name="Source_20_Text">IGameLibrary</text:span></text:span><text:span text:style-name="Strong_20_Emphasis"> to Qt</text:span> </text:p>
          <text:list>
            <text:list-item>
              <text:p text:style-name="P11"><text:soft-page-break/><text:span text:style-name="Source_20_Text">getAllGames()</text:span> should return a <text:span text:style-name="Source_20_Text">std::vector&lt;Game&gt;</text:span> or <text:span text:style-name="Source_20_Text">QVector&lt;Game&gt;</text:span> (with a conversion function). </text:p>
            </text:list-item>
          </text:list>
        </text:list-item>
        <text:list-item>
          <text:p text:style-name="P11"><text:span text:style-name="Strong_20_Emphasis">Separate GUI logic from CLI</text:span> </text:p>
          <text:list>
            <text:list-item>
              <text:p text:style-name="P11">Don’t call <text:span text:style-name="Source_20_Text">std::cout</text:span> in Steam/Epic classes; return data instead. </text:p>
            </text:list-item>
            <text:list-item>
              <text:p text:style-name="P11">Printer functions can later be replaced by Qt views. </text:p>
            </text:list-item>
          </text:list>
        </text:list-item>
        <text:list-item>
          <text:p text:style-name="P11"><text:span text:style-name="Strong_20_Emphasis">Add signals/slots (if needed)</text:span> </text:p>
          <text:list>
            <text:list-item>
              <text:p text:style-name="P11">For example, <text:span text:style-name="Source_20_Text">gamesRefreshed()</text:span> signal in <text:span text:style-name="Source_20_Text">GameManager</text:span>. </text:p>
            </text:list-item>
          </text:list>
        </text:list-item>
        <text:list-item>
          <text:p text:style-name="P2"><text:span text:style-name="Strong_20_Emphasis">Optional: Wrap </text:span><text:span text:style-name="Strong_20_Emphasis"><text:span text:style-name="Source_20_Text">Game</text:span></text:span><text:span text:style-name="Strong_20_Emphasis"> in a Qt-friendly type</text:span></text:p>
        </text:list-item>
      </text:list>
      <text:section text:style-name="Sect1" text:name="Bereich3">
        <text:list xml:id="list36458033" text:continue-numbering="true" text:style-name="L2">
          <text:list-header>
            <text:p text:style-name="P20"><text:bookmark text:name="code-block-viewer2"/>struct QGame {</text:p>
            <text:p text:style-name="P20"><text:s text:c="4"/>QString id;</text:p>
            <text:p text:style-name="P20"><text:s text:c="4"/>QString name;</text:p>
            <text:p text:style-name="P20"><text:s text:c="4"/>QString installDir;</text:p>
            <text:p text:style-name="P20"><text:s text:c="4"/>QString libraryPath;</text:p>
            <text:p text:style-name="P20"><text:s text:c="4"/>QStringList genres;</text:p>
            <text:p text:style-name="P20"><text:s text:c="4"/>QStringList tags;</text:p>
            <text:p text:style-name="P20"><text:s text:c="4"/>QString launcher;</text:p>
            <text:p text:style-name="P20">};</text:p>
          </text:list-header>
        </text:list>
      </text:section>
      <text:list xml:id="list36476327" text:continue-numbering="true" text:style-name="L2">
        <text:list-item>
          <text:list>
            <text:list-item>
              <text:p text:style-name="P2">Use this to populate <text:span text:style-name="Source_20_Text">QTableView</text:span> or <text:span text:style-name="Source_20_Text">QListView</text:span>. </text:p>
            </text:list-item>
          </text:list>
        </text:list-item>
      </text:list>
      <text:h text:style-name="Heading_20_1" text:outline-level="1"><text:span text:style-name="Strong_20_Emphasis">Phase 3 – Multi-Launcher Ready</text:span></text:h>
      <text:list xml:id="list4889655420535950513" text:style-name="L3">
        <text:list-item>
          <text:p text:style-name="P12">Implement new libraries: </text:p>
          <text:list>
            <text:list-item>
              <text:p text:style-name="P12"><text:span text:style-name="Source_20_Text">EpicLibrary : IGameLibrary</text:span> </text:p>
            </text:list-item>
            <text:list-item>
              <text:p text:style-name="P12"><text:span text:style-name="Source_20_Text">GogLibrary : IGameLibrary</text:span> </text:p>
            </text:list-item>
          </text:list>
        </text:list-item>
        <text:list-item>
          <text:p text:style-name="P3">Add them to <text:span text:style-name="Source_20_Text">GameManager</text:span>:</text:p>
        </text:list-item>
      </text:list>
      <text:section text:style-name="Sect1" text:name="Bereich4">
        <text:list xml:id="list36482852" text:continue-numbering="true" text:style-name="L3">
          <text:list-header>
            <text:p text:style-name="P21"><text:bookmark text:name="code-block-viewer3"/>manager.addLibrary(std::make_unique&lt;SteamLibrary&gt;());</text:p>
            <text:p text:style-name="P21">manager.addLibrary(std::make_unique&lt;EpicLibrary&gt;());</text:p>
            <text:p text:style-name="P21">manager.addLibrary(std::make_unique&lt;GogLibrary&gt;());</text:p>
          </text:list-header>
        </text:list>
      </text:section>
      <text:list xml:id="list36476348" text:continue-numbering="true" text:style-name="L3">
        <text:list-item>
          <text:p text:style-name="P3">No CLI/UI code changes are needed — everything works through the interface. </text:p>
        </text:list-item>
      </text:list>
      <text:h text:style-name="Heading_20_1" text:outline-level="1"><text:span text:style-name="Strong_20_Emphasis">Phase 4 – Qt GUI Integration</text:span></text:h>
      <text:list xml:id="list6353595784657596598" text:style-name="L4">
        <text:list-item>
          <text:p text:style-name="P13">Create a basic Qt project. </text:p>
        </text:list-item>
        <text:list-item>
          <text:p text:style-name="P4">Create a model class that wraps <text:span text:style-name="Source_20_Text">GameManager</text:span>:</text:p>
        </text:list-item>
      </text:list>
      <text:section text:style-name="Sect1" text:name="Bereich5">
        <text:list xml:id="list36470973" text:continue-numbering="true" text:style-name="L4">
          <text:list-header>
            <text:p text:style-name="P22"><text:bookmark text:name="code-block-viewer4"/>class GamesModel : public QAbstractTableModel {</text:p>
            <text:p text:style-name="P22"><text:s text:c="4"/>GameManager&amp; manager;</text:p>
            <text:p text:style-name="P22">};</text:p>
          </text:list-header>
        </text:list>
      </text:section>
      <text:list xml:id="list36469649" text:continue-numbering="true" text:style-name="L4">
        <text:list-item>
          <text:p text:style-name="P13">Populate <text:span text:style-name="Source_20_Text">QTableView</text:span> from the model. </text:p>
        </text:list-item>
        <text:list-item>
          <text:p text:style-name="P13">Add filters, sorting, and grouping in the model. </text:p>
        </text:list-item>
        <text:list-item>
          <text:p text:style-name="P4">Connect buttons to refresh, add tags, or launch games. </text:p>
        </text:list-item>
      </text:list>
      <text:h text:style-name="Heading_20_1" text:outline-level="1">Summary of Tasks</text:h>
      <text:list xml:id="list1277715475719386469" text:style-name="L5">
        <text:list-item>
          <text:p text:style-name="P14"><text:span text:style-name="Strong_20_Emphasis">Refactor Steam code into </text:span><text:span text:style-name="Strong_20_Emphasis"><text:span text:style-name="Source_20_Text">SteamLibrary</text:span></text:span><text:span text:style-name="Strong_20_Emphasis"> class.</text:span> </text:p>
        </text:list-item>
        <text:list-item>
          <text:p text:style-name="P14"><text:span text:style-name="Strong_20_Emphasis">Add </text:span><text:span text:style-name="Strong_20_Emphasis"><text:span text:style-name="Source_20_Text">IGameLibrary</text:span></text:span><text:span text:style-name="Strong_20_Emphasis"> interface</text:span> for all future launchers. </text:p>
        </text:list-item>
        <text:list-item>
          <text:p text:style-name="P14"><text:span text:style-name="Strong_20_Emphasis">Add </text:span><text:span text:style-name="Strong_20_Emphasis"><text:span text:style-name="Source_20_Text">GameManager</text:span></text:span> to hold multiple libraries and merge games. </text:p>
        </text:list-item>
        <text:list-item>
          <text:p text:style-name="P14"><text:span text:style-name="Strong_20_Emphasis">Update </text:span><text:span text:style-name="Strong_20_Emphasis"><text:span text:style-name="Source_20_Text">Game</text:span></text:span><text:span text:style-name="Strong_20_Emphasis"> struct</text:span> to include <text:span text:style-name="Source_20_Text">launcher</text:span> and <text:span text:style-name="Source_20_Text">string id</text:span>. </text:p>
        </text:list-item>
        <text:list-item>
          <text:p text:style-name="P14"><text:span text:style-name="Strong_20_Emphasis">CLI logic reads from </text:span><text:span text:style-name="Strong_20_Emphasis"><text:span text:style-name="Source_20_Text">GameManager</text:span></text:span>, not Steam directly. </text:p>
        </text:list-item>
        <text:list-item>
          <text:p text:style-name="P14"><text:span text:style-name="Strong_20_Emphasis">Prepare for Qt</text:span>: separate UI logic, convert <text:span text:style-name="Source_20_Text">Game</text:span> to Qt-friendly structures. </text:p>
        </text:list-item>
        <text:list-item>
          <text:p text:style-name="P5"><text:span text:style-name="Strong_20_Emphasis">Future</text:span>: add <text:span text:style-name="Source_20_Text">EpicLibrary</text:span>, <text:span text:style-name="Source_20_Text">GogLibrary</text:span>, etc.<text:line-break/></text:p>
        </text:list-item>
      </text:list>
      <text:h text:style-name="Heading_20_2" text:outline-level="2"><text:soft-page-break/><text:span text:style-name="Strong_20_Emphasis">QT HELP</text:span></text:h>
      <text:h text:style-name="Heading_20_2" text:outline-level="2"><text:span text:style-name="Strong_20_Emphasis">1. Core Concepts</text:span></text:h>
      <text:list xml:id="list2499265317067228971" text:style-name="L6">
        <text:list-item>
          <text:p text:style-name="P15"><text:span text:style-name="Strong_20_Emphasis">Qt Widgets vs. Qt Quick</text:span> </text:p>
          <text:list>
            <text:list-item>
              <text:p text:style-name="P15"><text:span text:style-name="Strong_20_Emphasis">Widgets</text:span>: Traditional desktop UI (buttons, tables, lists). Good for your library. </text:p>
            </text:list-item>
            <text:list-item>
              <text:p text:style-name="P15"><text:span text:style-name="Strong_20_Emphasis">Qt Quick (QML)</text:span>: Modern, touch-friendly, declarative UI. Optional for now. </text:p>
            </text:list-item>
          </text:list>
        </text:list-item>
        <text:list-item>
          <text:p text:style-name="P15"><text:span text:style-name="Strong_20_Emphasis">Signals &amp; Slots</text:span> </text:p>
          <text:list>
            <text:list-item>
              <text:p text:style-name="P15">Qt’s event system. Think: <text:span text:style-name="Emphasis">when a button is clicked, trigger a function.</text:span> </text:p>
            </text:list-item>
            <text:list-item>
              <text:p text:style-name="P6">Example:</text:p>
            </text:list-item>
          </text:list>
        </text:list-item>
      </text:list>
      <text:section text:style-name="Sect1" text:name="Bereich6">
        <text:list xml:id="list36458243" text:continue-numbering="true" text:style-name="L6">
          <text:list-item>
            <text:list>
              <text:list-header>
                <text:p text:style-name="P23"><text:bookmark text:name="code-block-viewer5"/>connect(refreshButton, &amp;QPushButton::clicked, this, &amp;LibraryWindow::refreshGames);</text:p>
              </text:list-header>
            </text:list>
          </text:list-item>
        </text:list>
      </text:section>
      <text:list xml:id="list36463261" text:continue-numbering="true" text:style-name="L6">
        <text:list-item>
          <text:p text:style-name="P15"><text:span text:style-name="Strong_20_Emphasis">Models &amp; Views (MVC)</text:span> </text:p>
          <text:list>
            <text:list-item>
              <text:p text:style-name="P15"><text:span text:style-name="Strong_20_Emphasis">QAbstractItemModel</text:span>: Represents your data (games, genres, etc.). </text:p>
            </text:list-item>
            <text:list-item>
              <text:p text:style-name="P15"><text:span text:style-name="Strong_20_Emphasis">QTableView / QListView / QTreeView</text:span>: Displays the data. </text:p>
            </text:list-item>
            <text:list-item>
              <text:p text:style-name="P15">For your library: you’ll want a <text:span text:style-name="Strong_20_Emphasis">table view</text:span> or <text:span text:style-name="Strong_20_Emphasis">list view</text:span> for games. </text:p>
            </text:list-item>
            <text:list-item>
              <text:p text:style-name="P6">You can sort, filter, and group by manipulating the model. </text:p>
            </text:list-item>
          </text:list>
        </text:list-item>
      </text:list>
      <text:h text:style-name="Heading_20_2" text:outline-level="2"><text:span text:style-name="Strong_20_Emphasis">2. Qt Classes You’ll Likely Use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Purpose</text:p>
            </table:table-cell>
            <table:table-cell table:style-name="Tabelle1.A1" office:value-type="string">
              <text:p text:style-name="Table_20_Heading">Class</text:p>
            </table:table-cell>
            <table:table-cell table:style-name="Tabelle1.A1" office:value-type="string">
              <text:p text:style-name="Table_20_Heading">Notes</text:p>
            </table:table-cell>
          </table:table-row>
        </table:table-header-rows>
        <table:table-row>
          <table:table-cell table:style-name="Tabelle1.A1" office:value-type="string">
            <text:p text:style-name="Table_20_Contents">Main Window</text:p>
          </table:table-cell>
          <table:table-cell table:style-name="Tabelle1.A1" office:value-type="string">
            <text:p text:style-name="Table_20_Contents"><text:span text:style-name="Source_20_Text">QMainWindow</text:span></text:p>
          </table:table-cell>
          <table:table-cell table:style-name="Tabelle1.A1" office:value-type="string">
            <text:p text:style-name="Table_20_Contents">Your main app window.</text:p>
          </table:table-cell>
        </table:table-row>
        <table:table-row>
          <table:table-cell table:style-name="Tabelle1.A1" office:value-type="string">
            <text:p text:style-name="Table_20_Contents">Buttons &amp; Inputs</text:p>
          </table:table-cell>
          <table:table-cell table:style-name="Tabelle1.A1" office:value-type="string">
            <text:p text:style-name="Table_20_Contents"><text:span text:style-name="Source_20_Text">QPushButton</text:span>, <text:span text:style-name="Source_20_Text">QLineEdit</text:span>, <text:span text:style-name="Source_20_Text">QComboBox</text:span></text:p>
          </table:table-cell>
          <table:table-cell table:style-name="Tabelle1.A1" office:value-type="string">
            <text:p text:style-name="Table_20_Contents">For refresh, search, filters.</text:p>
          </table:table-cell>
        </table:table-row>
        <table:table-row>
          <table:table-cell table:style-name="Tabelle1.A1" office:value-type="string">
            <text:p text:style-name="Table_20_Contents">Game List</text:p>
          </table:table-cell>
          <table:table-cell table:style-name="Tabelle1.A1" office:value-type="string">
            <text:p text:style-name="Table_20_Contents"><text:span text:style-name="Source_20_Text">QTableView</text:span></text:p>
          </table:table-cell>
          <table:table-cell table:style-name="Tabelle1.A1" office:value-type="string">
            <text:p text:style-name="Table_20_Contents">Show games in rows and columns.</text:p>
          </table:table-cell>
        </table:table-row>
        <table:table-row>
          <table:table-cell table:style-name="Tabelle1.A1" office:value-type="string">
            <text:p text:style-name="Table_20_Contents">Data Model</text:p>
          </table:table-cell>
          <table:table-cell table:style-name="Tabelle1.A1" office:value-type="string">
            <text:p text:style-name="Table_20_Contents"><text:span text:style-name="Source_20_Text">QAbstractTableModel</text:span></text:p>
          </table:table-cell>
          <table:table-cell table:style-name="Tabelle1.A1" office:value-type="string">
            <text:p text:style-name="Table_20_Contents">Custom model for your <text:span text:style-name="Source_20_Text">Game</text:span> vector.</text:p>
          </table:table-cell>
        </table:table-row>
        <table:table-row>
          <table:table-cell table:style-name="Tabelle1.A1" office:value-type="string">
            <text:p text:style-name="Table_20_Contents">Filtering</text:p>
          </table:table-cell>
          <table:table-cell table:style-name="Tabelle1.A1" office:value-type="string">
            <text:p text:style-name="Table_20_Contents"><text:span text:style-name="Source_20_Text">QSortFilterProxyModel</text:span></text:p>
          </table:table-cell>
          <table:table-cell table:style-name="Tabelle1.A1" office:value-type="string">
            <text:p text:style-name="Table_20_Contents">Sort &amp; filter without modifying underlying data.</text:p>
          </table:table-cell>
        </table:table-row>
        <table:table-row>
          <table:table-cell table:style-name="Tabelle1.A1" office:value-type="string">
            <text:p text:style-name="Table_20_Contents">Layouts</text:p>
          </table:table-cell>
          <table:table-cell table:style-name="Tabelle1.A1" office:value-type="string">
            <text:p text:style-name="Table_20_Contents"><text:span text:style-name="Source_20_Text">QVBoxLayout</text:span>, <text:span text:style-name="Source_20_Text">QHBoxLayout</text:span>, <text:span text:style-name="Source_20_Text">QGridLayout</text:span></text:p>
          </table:table-cell>
          <table:table-cell table:style-name="Tabelle1.A1" office:value-type="string">
            <text:p text:style-name="Table_20_Contents">Arrange widgets nicely.</text:p>
          </table:table-cell>
        </table:table-row>
        <table:table-row>
          <table:table-cell table:style-name="Tabelle1.A1" office:value-type="string">
            <text:p text:style-name="Table_20_Contents">Dialogs</text:p>
          </table:table-cell>
          <table:table-cell table:style-name="Tabelle1.A1" office:value-type="string">
            <text:p text:style-name="Table_20_Contents"><text:span text:style-name="Source_20_Text">QMessageBox</text:span>, <text:span text:style-name="Source_20_Text">QFileDialog</text:span></text:p>
          </table:table-cell>
          <table:table-cell table:style-name="Tabelle1.A1" office:value-type="string">
            <text:p text:style-name="Table_20_Contents">Show messages or let user pick folders.</text:p>
          </table:table-cell>
        </table:table-row>
      </table:table>
      <text:h text:style-name="Heading_20_2" text:outline-level="2"><text:span text:style-name="Strong_20_Emphasis">3. What You Need From Your Existing Code</text:span></text:h>
      <text:list xml:id="list6736877020437752161" text:style-name="L7">
        <text:list-item>
          <text:p text:style-name="P16"><text:span text:style-name="Strong_20_Emphasis">GameManager</text:span> → your data source. </text:p>
        </text:list-item>
        <text:list-item>
          <text:p text:style-name="P16"><text:span text:style-name="Strong_20_Emphasis">Game structure</text:span> → map fields to columns. </text:p>
        </text:list-item>
        <text:list-item>
          <text:p text:style-name="P16"><text:span text:style-name="Strong_20_Emphasis">Tags/Genres</text:span> → can be shown as additional columns or tooltips. </text:p>
        </text:list-item>
        <text:list-item>
          <text:p text:style-name="P7"><text:span text:style-name="Strong_20_Emphasis">Refresh / Enrich / Add tags</text:span> → connect functions to buttons. </text:p>
        </text:list-item>
      </text:list>
      <text:h text:style-name="Heading_20_2" text:outline-level="2"><text:span text:style-name="Strong_20_Emphasis">4. Recommended Workflow</text:span></text:h>
      <text:list xml:id="list5713451549077552722" text:style-name="L8">
        <text:list-item>
          <text:p text:style-name="P17"><text:span text:style-name="Strong_20_Emphasis">Create </text:span><text:span text:style-name="Strong_20_Emphasis"><text:span text:style-name="Source_20_Text">GamesModel</text:span></text:span> </text:p>
          <text:list>
            <text:list-item>
              <text:p text:style-name="P17">Inherit from <text:span text:style-name="Source_20_Text">QAbstractTableModel</text:span>. </text:p>
            </text:list-item>
            <text:list-item>
              <text:p text:style-name="P17">Use your <text:span text:style-name="Source_20_Text">GameManager</text:span> internally. </text:p>
            </text:list-item>
            <text:list-item>
              <text:p text:style-name="P17">Implement at least: </text:p>
              <text:list>
                <text:list-item>
                  <text:p text:style-name="P17"><text:span text:style-name="Source_20_Text">rowCount()</text:span> </text:p>
                </text:list-item>
                <text:list-item>
                  <text:p text:style-name="P17"><text:soft-page-break/><text:span text:style-name="Source_20_Text">columnCount()</text:span> </text:p>
                </text:list-item>
                <text:list-item>
                  <text:p text:style-name="P17"><text:span text:style-name="Source_20_Text">data()</text:span> </text:p>
                </text:list-item>
                <text:list-item>
                  <text:p text:style-name="P17"><text:span text:style-name="Source_20_Text">headerData()</text:span> (optional, column names) </text:p>
                </text:list-item>
              </text:list>
            </text:list-item>
            <text:list-item>
              <text:p text:style-name="P17">Later, support adding/removing tags or games. </text:p>
            </text:list-item>
          </text:list>
        </text:list-item>
        <text:list-item>
          <text:p text:style-name="P17"><text:span text:style-name="Strong_20_Emphasis">Add </text:span><text:span text:style-name="Strong_20_Emphasis"><text:span text:style-name="Source_20_Text">QTableView</text:span></text:span><text:span text:style-name="Strong_20_Emphasis"> in </text:span><text:span text:style-name="Strong_20_Emphasis"><text:span text:style-name="Source_20_Text">QMainWindow</text:span></text:span> </text:p>
          <text:list>
            <text:list-item>
              <text:p text:style-name="P8">Set your <text:span text:style-name="Source_20_Text">GamesModel</text:span> as the model:</text:p>
            </text:list-item>
          </text:list>
        </text:list-item>
      </text:list>
      <text:section text:style-name="Sect1" text:name="Bereich7">
        <text:list xml:id="list36483316" text:continue-numbering="true" text:style-name="L8">
          <text:list-item>
            <text:list>
              <text:list-header>
                <text:p text:style-name="P24"><text:bookmark text:name="code-block-viewer6"/>tableView-&gt;setModel(&amp;gamesModel);</text:p>
              </text:list-header>
            </text:list>
          </text:list-item>
        </text:list>
      </text:section>
      <text:list xml:id="list36458947" text:continue-numbering="true" text:style-name="L8">
        <text:list-item>
          <text:list>
            <text:list-item>
              <text:p text:style-name="P17">Wrap it in a <text:span text:style-name="Source_20_Text">QSortFilterProxyModel</text:span> for sorting/filtering. </text:p>
            </text:list-item>
          </text:list>
        </text:list-item>
        <text:list-item>
          <text:p text:style-name="P17"><text:span text:style-name="Strong_20_Emphasis">Add Buttons &amp; Inputs</text:span> </text:p>
          <text:list>
            <text:list-item>
              <text:p text:style-name="P17">Refresh, filter by genre/tag, sort/group combo boxes. </text:p>
            </text:list-item>
          </text:list>
        </text:list-item>
        <text:list-item>
          <text:p text:style-name="P17"><text:span text:style-name="Strong_20_Emphasis">Connect signals to slots</text:span> </text:p>
          <text:list>
            <text:list-item>
              <text:p text:style-name="P17">Example: filter input → updates <text:span text:style-name="Source_20_Text">QSortFilterProxyModel</text:span>. </text:p>
            </text:list-item>
            <text:list-item>
              <text:p text:style-name="P8">Refresh button → reload games from <text:span text:style-name="Source_20_Text">GameManager</text:span>. </text:p>
            </text:list-item>
          </text:list>
        </text:list-item>
      </text:list>
      <text:h text:style-name="Heading_20_2" text:outline-level="2"><text:span text:style-name="Strong_20_Emphasis">5. Optional Features</text:span></text:h>
      <text:list xml:id="list2545010403284584782" text:style-name="L9">
        <text:list-item>
          <text:p text:style-name="P18">Double-click to launch a game (connect <text:span text:style-name="Source_20_Text">QTableView::doubleClicked</text:span> signal to a slot that calls Steam/Epic/GOG API). </text:p>
        </text:list-item>
        <text:list-item>
          <text:p text:style-name="P18">Color-code games by launcher. </text:p>
        </text:list-item>
        <text:list-item>
          <text:p text:style-name="P9">Show tooltips with tags/genres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2M23S</meta:editing-duration>
    <meta:editing-cycles>5</meta:editing-cycles>
    <meta:generator>OpenOffice/4.1.16$Win32 OpenOffice.org_project/4116m3$Build-9816</meta:generator>
    <dc:date>2026-04-09T16:19:07.81</dc:date>
    <dc:creator>Kilian Stelling</dc:creator>
    <meta:document-statistic meta:table-count="1" meta:image-count="0" meta:object-count="0" meta:page-count="4" meta:paragraph-count="153" meta:word-count="808" meta:character-count="5462"/>
    <meta:user-defined meta:name="Info 1"/>
    <meta:user-defined meta:name="Info 2"/>
    <meta:user-defined meta:name="Info 3"/>
    <meta:user-defined meta:name="Info 4"/>
  </office:meta>
</office:document-meta>
</file>
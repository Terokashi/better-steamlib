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>
      <style:text-properties fo:font-size="20pt" style:font-size-asian="20pt" style:font-size-complex="20pt"/>
    </style:style>
    <style:style style:name="P20" style:family="paragraph" style:parent-style-name="Preformatted_20_Text" style:list-style-name="L7"/>
    <style:style style:name="P21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Project Plan: Custom Steam Library Tool (C++)</text:h>
      <text:h text:style-name="Heading_20_2" text:outline-level="2">Goal</text:h>
      <text:p text:style-name="Text_20_body">Build a tool that:</text:p>
      <text:list xml:id="list6797533264445732405" text:style-name="L1">
        <text:list-item>
          <text:p text:style-name="P1">Detects installed Steam games</text:p>
        </text:list-item>
        <text:list-item>
          <text:p text:style-name="P1">Adds genre metadata</text:p>
        </text:list-item>
        <text:list-item>
          <text:p text:style-name="P1">Allows filtering (genre)</text:p>
        </text:list-item>
        <text:list-item>
          <text:p text:style-name="P1">Allows sorting/grouping (install location / drive)</text:p>
        </text:list-item>
      </text:list>
      <text:p text:style-name="Horizontal_20_Line"/>
      <text:h text:style-name="P21" text:outline-level="1">Phase 1 — Foundation (Local Data Only)</text:h>
      <text:p text:style-name="Text_20_body"><text:span text:style-name="Strong_20_Emphasis">Goal:</text:span> Get installed games working <text:span text:style-name="Emphasis">without any external APIs</text:span></text:p>
      <text:h text:style-name="Heading_20_3" text:outline-level="3">Tasks</text:h>
      <text:list xml:id="list994825366978946594" text:style-name="L2">
        <text:list-item>
          <text:p text:style-name="P2">Locate Steam folder</text:p>
        </text:list-item>
        <text:list-item>
          <text:p text:style-name="P2">Parse <text:span text:style-name="Source_20_Text">libraryfolders.vdf</text:span></text:p>
        </text:list-item>
        <text:list-item>
          <text:p text:style-name="P2">Extract all library paths</text:p>
        </text:list-item>
        <text:list-item>
          <text:p text:style-name="P2">Scan each <text:span text:style-name="Source_20_Text">/steamapps/</text:span> folder</text:p>
        </text:list-item>
        <text:list-item>
          <text:p text:style-name="P2">Parse <text:span text:style-name="Source_20_Text">appmanifest_*.acf</text:span></text:p>
        </text:list-item>
      </text:list>
      <text:h text:style-name="Heading_20_3" text:outline-level="3">Output</text:h>
      <text:p text:style-name="Text_20_body">A working CLI that prints:</text:p>
      <text:section text:style-name="Sect1" text:name="code-block-viewer">
        <text:p text:style-name="Preformatted_20_Text">[Drive D:]</text:p>
        <text:p text:style-name="Preformatted_20_Text">- Elden Ring</text:p>
        <text:p text:style-name="Preformatted_20_Text">- Cyberpunk 2077</text:p>
        <text:p text:style-name="Preformatted_20_Text">[Drive E:]</text:p>
        <text:p text:style-name="Preformatted_20_Text">- Hades</text:p>
      </text:section>
      <text:h text:style-name="Heading_20_3" text:outline-level="3">Key Deliverable</text:h>
      <text:section text:style-name="Sect1" text:name="Bereich1">
        <text:p text:style-name="Preformatted_20_Text"><text:bookmark text:name="code-block-viewer"/>steamlib list</text:p>
      </text:section>
      <text:p text:style-name="Horizontal_20_Line"/>
      <text:h text:style-name="P21" text:outline-level="1"/>
      <text:p text:style-name="P19"/>
      <text:p text:style-name="P19"/>
      <text:h text:style-name="P21" text:outline-level="1"><text:soft-page-break/>Phase 2 — Internal Data Model</text:h>
      <text:p text:style-name="Text_20_body"><text:span text:style-name="Strong_20_Emphasis">Goal:</text:span> Clean structure so future features don’t become messy</text:p>
      <text:h text:style-name="Heading_20_3" text:outline-level="3">Tasks</text:h>
      <text:list xml:id="list2804011570204589442" text:style-name="L3">
        <text:list-item>
          <text:p text:style-name="P3">Define <text:span text:style-name="Source_20_Text">Game</text:span> struct/class</text:p>
        </text:list-item>
        <text:list-item>
          <text:p text:style-name="P3">Store:</text:p>
          <text:list>
            <text:list-item>
              <text:p text:style-name="P3">appid</text:p>
            </text:list-item>
            <text:list-item>
              <text:p text:style-name="P3">name</text:p>
            </text:list-item>
            <text:list-item>
              <text:p text:style-name="P3">install path</text:p>
            </text:list-item>
            <text:list-item>
              <text:p text:style-name="P3">library path</text:p>
            </text:list-item>
            <text:list-item>
              <text:p text:style-name="P3">size</text:p>
            </text:list-item>
          </text:list>
        </text:list-item>
        <text:list-item>
          <text:p text:style-name="P3">Create central container (<text:span text:style-name="Source_20_Text">std::vector&lt;Game&gt;</text:span>)</text:p>
        </text:list-item>
      </text:list>
      <text:h text:style-name="Heading_20_3" text:outline-level="3">Output</text:h>
      <text:p text:style-name="Text_20_body">You can:</text:p>
      <text:list xml:id="list1616416682416255096" text:style-name="L4">
        <text:list-item>
          <text:p text:style-name="P4">Load all games into memory</text:p>
        </text:list-item>
        <text:list-item>
          <text:p text:style-name="P4">Print them in different formats</text:p>
        </text:list-item>
      </text:list>
      <text:h text:style-name="Heading_20_3" text:outline-level="3">Bonus</text:h>
      <text:list xml:id="list5738153369067392666" text:style-name="L5">
        <text:list-item>
          <text:p text:style-name="P5">Serialize to JSON cache (optional)</text:p>
        </text:list-item>
      </text:list>
      <text:p text:style-name="Horizontal_20_Line"/>
      <text:h text:style-name="P21" text:outline-level="1">Phase 3 — Sorting &amp; Grouping</text:h>
      <text:p text:style-name="Text_20_body"><text:span text:style-name="Strong_20_Emphasis">Goal:</text:span> Your first “real feature”</text:p>
      <text:h text:style-name="Heading_20_3" text:outline-level="3">Tasks</text:h>
      <text:list xml:id="list3683599313662758225" text:style-name="L6">
        <text:list-item>
          <text:p text:style-name="P6">Sort by:</text:p>
          <text:list>
            <text:list-item>
              <text:p text:style-name="P6">install path</text:p>
            </text:list-item>
            <text:list-item>
              <text:p text:style-name="P6">name</text:p>
            </text:list-item>
            <text:list-item>
              <text:p text:style-name="P6">size</text:p>
            </text:list-item>
          </text:list>
        </text:list-item>
        <text:list-item>
          <text:p text:style-name="P6">Group by library (drive)</text:p>
        </text:list-item>
      </text:list>
      <text:h text:style-name="Heading_20_3" text:outline-level="3">Output Commands</text:h>
      <text:section text:style-name="Sect1" text:name="Bereich2">
        <text:p text:style-name="Preformatted_20_Text"><text:bookmark text:name="code-block-viewer1"/>steamlib sort name</text:p>
        <text:p text:style-name="Preformatted_20_Text">steamlib sort size</text:p>
        <text:p text:style-name="Preformatted_20_Text">steamlib group drive</text:p>
      </text:section>
      <text:p text:style-name="Horizontal_20_Line"/>
      <text:h text:style-name="Heading_20_1" text:outline-level="1"><text:soft-page-break/></text:h>
      <text:h text:style-name="Heading_20_1" text:outline-level="1"/>
      <text:h text:style-name="Heading_20_1" text:outline-level="1">Phase 4 — Metadata (Genres via API)</text:h>
      <text:p text:style-name="Text_20_body"><text:span text:style-name="Strong_20_Emphasis">Goal:</text:span> Enrich your data (this is where it becomes powerful)</text:p>
      <text:h text:style-name="Heading_20_3" text:outline-level="3">Tasks</text:h>
      <text:list xml:id="list4005809405447462790" text:style-name="L7">
        <text:list-item>
          <text:p text:style-name="P7">Implement HTTP client (<text:span text:style-name="Source_20_Text">cpr</text:span> or <text:span text:style-name="Source_20_Text">libcurl</text:span>)</text:p>
        </text:list-item>
        <text:list-item>
          <text:p text:style-name="P7">Call:</text:p>
        </text:list-item>
      </text:list>
      <text:section text:style-name="Sect1" text:name="Bereich3">
        <text:list xml:id="list29646055" text:continue-numbering="true" text:style-name="L7">
          <text:list-header>
            <text:p text:style-name="P20"><text:bookmark text:name="code-block-viewer2"/>https://store.steampowered.com/api/appdetails?appids=APPID</text:p>
          </text:list-header>
        </text:list>
      </text:section>
      <text:list xml:id="list29650858" text:continue-numbering="true" text:style-name="L7">
        <text:list-item>
          <text:p text:style-name="P7">Extract:</text:p>
          <text:list>
            <text:list-item>
              <text:p text:style-name="P7">genres</text:p>
            </text:list-item>
            <text:list-item>
              <text:p text:style-name="P7">categories (optional)</text:p>
            </text:list-item>
          </text:list>
        </text:list-item>
        <text:list-item>
          <text:p text:style-name="P7">Cache responses locally (<text:span text:style-name="Source_20_Text">cache/appid.json</text:span>)</text:p>
        </text:list-item>
      </text:list>
      <text:h text:style-name="Heading_20_3" text:outline-level="3">Output</text:h>
      <text:p text:style-name="Text_20_body">Each game now has:</text:p>
      <text:section text:style-name="Sect1" text:name="Bereich4">
        <text:p text:style-name="Preformatted_20_Text"><text:bookmark text:name="code-block-viewer3"/>Hades → Action, Roguelike</text:p>
      </text:section>
      <text:h text:style-name="Heading_20_3" text:outline-level="3">Important</text:h>
      <text:list xml:id="list3589810188572561273" text:style-name="L8">
        <text:list-item>
          <text:p text:style-name="P8">Cache aggressively</text:p>
        </text:list-item>
        <text:list-item>
          <text:p text:style-name="P8">Add “offline mode”</text:p>
        </text:list-item>
      </text:list>
      <text:p text:style-name="Horizontal_20_Line"/>
      <text:h text:style-name="P21" text:outline-level="1">Phase 5 — Filtering</text:h>
      <text:p text:style-name="Text_20_body"><text:span text:style-name="Strong_20_Emphasis">Goal:</text:span> Core usability feature</text:p>
      <text:h text:style-name="Heading_20_3" text:outline-level="3">Tasks</text:h>
      <text:list xml:id="list2497292878956730189" text:style-name="L9">
        <text:list-item>
          <text:p text:style-name="P9">Filter by genre</text:p>
        </text:list-item>
        <text:list-item>
          <text:p text:style-name="P9">Combine filters (optional)</text:p>
        </text:list-item>
      </text:list>
      <text:h text:style-name="Heading_20_3" text:outline-level="3">Output Commands</text:h>
      <text:section text:style-name="Sect1" text:name="Bereich5">
        <text:p text:style-name="Preformatted_20_Text"><text:bookmark text:name="code-block-viewer4"/>steamlib filter genre=RPG</text:p>
        <text:p text:style-name="Preformatted_20_Text">steamlib filter genre=Action</text:p>
      </text:section>
      <text:h text:style-name="Heading_20_3" text:outline-level="3">Stretch</text:h>
      <text:section text:style-name="Sect1" text:name="Bereich6">
        <text:p text:style-name="Preformatted_20_Text"><text:bookmark text:name="code-block-viewer5"/>steamlib filter genre=RPG drive=D:</text:p>
      </text:section>
      <text:h text:style-name="P21" text:outline-level="1"><text:soft-page-break/>Phase 6 — Performance &amp; Caching</text:h>
      <text:p text:style-name="Text_20_body"><text:span text:style-name="Strong_20_Emphasis">Goal:</text:span> Make it fast and scalable</text:p>
      <text:h text:style-name="Heading_20_3" text:outline-level="3">Tasks</text:h>
      <text:list xml:id="list3612385855230601183" text:style-name="L10">
        <text:list-item>
          <text:p text:style-name="P10">Cache parsed manifests</text:p>
        </text:list-item>
        <text:list-item>
          <text:p text:style-name="P10">Cache API responses</text:p>
        </text:list-item>
        <text:list-item>
          <text:p text:style-name="P10">Add multithreading for API fetches</text:p>
        </text:list-item>
        <text:list-item>
          <text:p text:style-name="P10">Lazy loading (only fetch missing genres)</text:p>
        </text:list-item>
      </text:list>
      <text:h text:style-name="Heading_20_3" text:outline-level="3">Output</text:h>
      <text:list xml:id="list6767661497151186675" text:style-name="L11">
        <text:list-item>
          <text:p text:style-name="P11">Startup time &lt; 1 second after caching</text:p>
        </text:list-item>
        <text:list-item>
          <text:p text:style-name="P11">No repeated API calls</text:p>
        </text:list-item>
      </text:list>
      <text:p text:style-name="Horizontal_20_Line"/>
      <text:h text:style-name="P21" text:outline-level="1">Phase 7 — UI Upgrade (Optional but Powerful)</text:h>
      <text:h text:style-name="Heading_20_2" text:outline-level="2">Option A: CLI+ (Recommended first)</text:h>
      <text:list xml:id="list9109823184514415959" text:style-name="L12">
        <text:list-item>
          <text:p text:style-name="P12">Better formatting</text:p>
        </text:list-item>
        <text:list-item>
          <text:p text:style-name="P12">Colors</text:p>
        </text:list-item>
        <text:list-item>
          <text:p text:style-name="P12">Tables</text:p>
        </text:list-item>
      </text:list>
      <text:h text:style-name="Heading_20_2" text:outline-level="2">Option B: GUI</text:h>
      <text:list xml:id="list6362087309947985501" text:style-name="L13">
        <text:list-item>
          <text:p text:style-name="P13">ImGui (best balance)</text:p>
        </text:list-item>
        <text:list-item>
          <text:p text:style-name="P13">Qt (if you want full app feel)</text:p>
        </text:list-item>
      </text:list>
      <text:h text:style-name="Heading_20_3" text:outline-level="3">Features</text:h>
      <text:list xml:id="list5601698127095336364" text:style-name="L14">
        <text:list-item>
          <text:p text:style-name="P14">Dropdown genre filter</text:p>
        </text:list-item>
        <text:list-item>
          <text:p text:style-name="P14">Sort buttons</text:p>
        </text:list-item>
        <text:list-item>
          <text:p text:style-name="P14">Library tabs (by drive)</text:p>
        </text:list-item>
      </text:list>
      <text:p text:style-name="Horizontal_20_Line"/>
      <text:h text:style-name="P21" text:outline-level="1"><text:soft-page-break/></text:h>
      <text:h text:style-name="P21" text:outline-level="1">Phase 8 — Polish &amp; Edge Cases</text:h>
      <text:h text:style-name="Heading_20_3" text:outline-level="3">Tasks</text:h>
      <text:list xml:id="list7987967007438204331" text:style-name="L15">
        <text:list-item>
          <text:p text:style-name="P15">Handle missing manifests</text:p>
        </text:list-item>
        <text:list-item>
          <text:p text:style-name="P15">Handle duplicate installs</text:p>
        </text:list-item>
        <text:list-item>
          <text:p text:style-name="P15">Handle empty API responses</text:p>
        </text:list-item>
        <text:list-item>
          <text:p text:style-name="P15">Add logging/debug mode</text:p>
        </text:list-item>
      </text:list>
      <text:p text:style-name="Horizontal_20_Line"/>
      <text:h text:style-name="Heading_20_1" text:outline-level="1"/>
      <text:h text:style-name="Heading_20_1" text:outline-level="1"/>
      <text:h text:style-name="Heading_20_1" text:outline-level="1">Suggested Folder Structure</text:h>
      <text:section text:style-name="Sect1" text:name="Bereich7">
        <text:p text:style-name="Preformatted_20_Text"><text:bookmark text:name="code-block-viewer6"/>steamlib/</text:p>
        <text:p text:style-name="Preformatted_20_Text">├── src/</text:p>
        <text:p text:style-name="Preformatted_20_Text">│ <text:s text:c="2"/>├── main.cpp</text:p>
        <text:p text:style-name="Preformatted_20_Text">│ <text:s text:c="2"/>├── steam_parser.cpp</text:p>
        <text:p text:style-name="Preformatted_20_Text">│ <text:s text:c="2"/>├── vdf_parser.cpp</text:p>
        <text:p text:style-name="Preformatted_20_Text">│ <text:s text:c="2"/>├── api_client.cpp</text:p>
        <text:p text:style-name="Preformatted_20_Text">│ <text:s text:c="2"/>├── cache.cpp</text:p>
        <text:p text:style-name="Preformatted_20_Text">│ <text:s text:c="2"/>└── filters.cpp</text:p>
        <text:p text:style-name="Preformatted_20_Text">├── include/</text:p>
        <text:p text:style-name="Preformatted_20_Text">├── cache/</text:p>
        <text:p text:style-name="Preformatted_20_Text">├── tests/</text:p>
        <text:p text:style-name="Preformatted_20_Text">├── CMakeLists.txt</text:p>
      </text:section>
      <text:p text:style-name="Horizontal_20_Line"/>
      <text:h text:style-name="P21" text:outline-level="1">Tech Stack</text:h>
      <text:list xml:id="list8815005186526325652" text:style-name="L16">
        <text:list-item>
          <text:p text:style-name="P16">C++17 or C++20</text:p>
        </text:list-item>
        <text:list-item>
          <text:p text:style-name="P16"><text:span text:style-name="Source_20_Text">nlohmann/json</text:span> → JSON parsing</text:p>
        </text:list-item>
        <text:list-item>
          <text:p text:style-name="P16"><text:span text:style-name="Source_20_Text">cpr</text:span> or <text:span text:style-name="Source_20_Text">libcurl</text:span> → HTTP</text:p>
        </text:list-item>
        <text:list-item>
          <text:p text:style-name="P16">Optional:</text:p>
          <text:list>
            <text:list-item>
              <text:p text:style-name="P16">ImGui → UI</text:p>
            </text:list-item>
          </text:list>
        </text:list-item>
      </text:list>
      <text:p text:style-name="Horizontal_20_Line"/>
      <text:h text:style-name="P21" text:outline-level="1"><text:soft-page-break/>⏱️Realistic Timeline</text:h>
      <text:p text:style-name="Text_20_body">If you work casually:</text:p>
      <text:list xml:id="list198563637634327256" text:style-name="L17">
        <text:list-item>
          <text:p text:style-name="P17">Phase 1–2: <text:span text:style-name="Strong_20_Emphasis">1–2 days</text:span></text:p>
        </text:list-item>
        <text:list-item>
          <text:p text:style-name="P17">Phase 3: <text:span text:style-name="Strong_20_Emphasis">1 day</text:span></text:p>
        </text:list-item>
        <text:list-item>
          <text:p text:style-name="P17">Phase 4: <text:span text:style-name="Strong_20_Emphasis">2–3 days</text:span></text:p>
        </text:list-item>
        <text:list-item>
          <text:p text:style-name="P17">Phase 5: <text:span text:style-name="Strong_20_Emphasis">1 day</text:span></text:p>
        </text:list-item>
        <text:list-item>
          <text:p text:style-name="P17">Phase 6: <text:span text:style-name="Strong_20_Emphasis">2 days</text:span></text:p>
        </text:list-item>
        <text:list-item>
          <text:p text:style-name="P17">Phase 7 (GUI): <text:span text:style-name="Strong_20_Emphasis">3–7 days</text:span></text:p>
        </text:list-item>
      </text:list>
      <text:p text:style-name="Text_20_body">? Total: ~1–2 weeks for a solid tool</text:p>
      <text:p text:style-name="Horizontal_20_Line"/>
      <text:h text:style-name="P21" text:outline-level="1">MVP Definition (Important)</text:h>
      <text:p text:style-name="Text_20_body">Don’t overbuild. Your <text:span text:style-name="Strong_20_Emphasis">minimum viable version</text:span> is:</text:p>
      <text:p text:style-name="Text_20_body">✔ Detect installed games<text:line-break/>✔ Sort by install location<text:line-break/>✔ Filter by genre</text:p>
      <text:p text:style-name="Text_20_body">Once that works—you’ve already beaten Steam’s UX in that area.</text:p>
      <text:p text:style-name="Horizontal_20_Line"/>
      <text:h text:style-name="P21" text:outline-level="1"/>
      <text:h text:style-name="P21" text:outline-level="1">Smart Feature Ideas (Later)</text:h>
      <text:list xml:id="list3764554530556642082" text:style-name="L18">
        <text:list-item>
          <text:p text:style-name="P18">Tag system (better than genres)</text:p>
        </text:list-item>
        <text:list-item>
          <text:p text:style-name="P18">Disk usage visualization</text:p>
        </text:list-item>
        <text:list-item>
          <text:p text:style-name="P18">“What’s on which drive” summary</text:p>
        </text:list-item>
        <text:list-item>
          <text:p text:style-name="P18">Launch games from your tool</text:p>
        </text:list-item>
        <text:list-item>
          <text:p text:style-name="P18">Detect uninstalled but owned games (advanced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ilian Stelling</meta:initial-creator>
    <meta:creation-date>2026-03-18T09:33:25.93</meta:creation-date>
    <meta:document-statistic meta:table-count="0" meta:image-count="0" meta:object-count="0" meta:page-count="6" meta:paragraph-count="145" meta:word-count="567" meta:character-count="3153"/>
    <dc:date>2026-03-18T09:38:29.24</dc:date>
    <dc:creator>Kilian Stelling</dc:creator>
    <meta:editing-duration>PT5M5S</meta:editing-duration>
    <meta:editing-cycles>1</meta:editing-cycles>
    <meta:generator>OpenOffice/4.1.16$Win32 OpenOffice.org_project/4116m3$Build-9816</meta:generator>
  </office:meta>
</office:document-meta>
</file>